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ce style:name="Palatino" svg:font-family="Palatino" style:font-family-generic="roman"/>
    <style:font-face style:name="Times New Roman" svg:font-family="'Times New Roman'" style:font-family-generic="roman"/>
  </office:font-face-decls>
  <office:automatic-styles>
    <style:style style:name="P1" style:family="paragraph" style:parent-style-name="Text_20_body">
      <style:text-properties officeooo:rsid="000a9190" officeooo:paragraph-rsid="000a9190"/>
    </style:style>
    <style:style style:name="P2" style:family="paragraph" style:parent-style-name="Standard">
      <style:text-properties style:font-name="Calibri" officeooo:rsid="000585be" officeooo:paragraph-rsid="000585be"/>
    </style:style>
    <style:style style:name="P3" style:family="paragraph" style:parent-style-name="Standard">
      <style:text-properties style:font-name="Calibri" officeooo:rsid="0007814f" officeooo:paragraph-rsid="0007814f"/>
    </style:style>
    <style:style style:name="P4" style:family="paragraph" style:parent-style-name="Standard">
      <style:text-properties style:font-name="Calibri" officeooo:rsid="00087c20" officeooo:paragraph-rsid="000c8f72"/>
    </style:style>
    <style:style style:name="P5" style:family="paragraph" style:parent-style-name="Standard">
      <style:text-properties style:font-name="Calibri" officeooo:rsid="00087c20" officeooo:paragraph-rsid="000a5fb1"/>
    </style:style>
    <style:style style:name="P6" style:family="paragraph" style:parent-style-name="Standard">
      <style:text-properties style:font-name="Calibri" officeooo:rsid="00087c20" officeooo:paragraph-rsid="000da321"/>
    </style:style>
    <style:style style:name="P7" style:family="paragraph" style:parent-style-name="Standard">
      <style:text-properties style:font-name="Calibri" officeooo:rsid="000da321" officeooo:paragraph-rsid="000e4fb0"/>
    </style:style>
    <style:style style:name="P8" style:family="paragraph" style:parent-style-name="Standard">
      <style:text-properties style:font-name="Calibri" fo:language="en" fo:country="US" officeooo:rsid="000e4fb0" officeooo:paragraph-rsid="000e4fb0"/>
    </style:style>
    <style:style style:name="P9" style:family="paragraph" style:parent-style-name="Standard">
      <style:text-properties style:font-name="Calibri" fo:language="sv" fo:country="SE" officeooo:rsid="00101bd9" officeooo:paragraph-rsid="00101bd9"/>
    </style:style>
    <style:style style:name="P10" style:family="paragraph" style:parent-style-name="Standard">
      <style:text-properties style:font-name="Calibri" fo:language="sv" fo:country="SE" officeooo:rsid="001188dc" officeooo:paragraph-rsid="001188dc"/>
    </style:style>
    <style:style style:name="P11" style:family="paragraph" style:parent-style-name="Standard">
      <style:text-properties style:font-name="Calibri" fo:language="sv" fo:country="SE" officeooo:rsid="000e4fb0" officeooo:paragraph-rsid="001188dc"/>
    </style:style>
    <style:style style:name="P12" style:family="paragraph" style:parent-style-name="Standard">
      <style:text-properties style:font-name="Calibri" fo:language="sv" fo:country="SE" officeooo:rsid="000e4fb0" officeooo:paragraph-rsid="00101bd9"/>
    </style:style>
    <style:style style:name="P13" style:family="paragraph" style:parent-style-name="Standard">
      <style:text-properties style:font-name="Calibri" fo:language="sv" fo:country="SE" officeooo:rsid="0011b19b" officeooo:paragraph-rsid="0011b19b"/>
    </style:style>
    <style:style style:name="P14" style:family="paragraph" style:parent-style-name="Standard">
      <style:text-properties style:font-name="Calibri" fo:language="sv" fo:country="SE" officeooo:rsid="000e4fb0" officeooo:paragraph-rsid="000e4fb0"/>
    </style:style>
    <style:style style:name="P15" style:family="paragraph" style:parent-style-name="Standard">
      <style:text-properties style:font-name="Calibri" fo:language="sv" fo:country="SE" officeooo:rsid="0014c067" officeooo:paragraph-rsid="0014c067"/>
    </style:style>
    <style:style style:name="P16" style:family="paragraph" style:parent-style-name="Standard">
      <style:text-properties style:use-window-font-color="true" loext:opacity="0%" style:font-name="Calibri" fo:language="en" fo:country="US" officeooo:rsid="000e4fb0" officeooo:paragraph-rsid="0014c067"/>
    </style:style>
    <style:style style:name="P17" style:family="paragraph" style:parent-style-name="Standard">
      <style:text-properties style:use-window-font-color="true" loext:opacity="0%" style:font-name="Calibri" fo:language="sv" fo:country="SE" officeooo:rsid="0014c067" officeooo:paragraph-rsid="0014c067"/>
    </style:style>
    <style:style style:name="P18" style:family="paragraph" style:parent-style-name="Standard">
      <style:text-properties fo:color="#ff0000" loext:opacity="100%" style:font-name="Calibri" officeooo:rsid="0014c067" officeooo:paragraph-rsid="0014c067"/>
    </style:style>
    <style:style style:name="P19" style:family="paragraph" style:parent-style-name="Standard">
      <style:text-properties style:font-name="Calibri" officeooo:rsid="0014c067" officeooo:paragraph-rsid="0014c067"/>
    </style:style>
    <style:style style:name="P20" style:family="paragraph" style:parent-style-name="Standard">
      <style:text-properties style:font-name="Calibri" officeooo:rsid="0016b8c1" officeooo:paragraph-rsid="0017e4a9"/>
    </style:style>
    <style:style style:name="P21" style:family="paragraph" style:parent-style-name="Standard">
      <style:text-properties style:font-name="Calibri" officeooo:rsid="0017e4a9" officeooo:paragraph-rsid="0017e4a9"/>
    </style:style>
    <style:style style:name="P22" style:family="paragraph" style:parent-style-name="Standard">
      <style:text-properties style:font-name="Calibri" officeooo:rsid="0016b8c1" officeooo:paragraph-rsid="0016b8c1"/>
    </style:style>
    <style:style style:name="P23" style:family="paragraph" style:parent-style-name="Heading_20_2">
      <style:text-properties officeooo:rsid="0017e4a9" officeooo:paragraph-rsid="0017e4a9"/>
    </style:style>
    <style:style style:name="P24" style:family="paragraph" style:parent-style-name="Text_20_body">
      <style:text-properties officeooo:paragraph-rsid="0017e4a9"/>
    </style:style>
    <style:style style:name="T1" style:family="text">
      <style:text-properties officeooo:rsid="0006f10b"/>
    </style:style>
    <style:style style:name="T2" style:family="text">
      <style:text-properties officeooo:rsid="0007814f"/>
    </style:style>
    <style:style style:name="T3" style:family="text">
      <style:text-properties officeooo:rsid="00087c20"/>
    </style:style>
    <style:style style:name="T4" style:family="text">
      <style:text-properties officeooo:rsid="000a5fb1"/>
    </style:style>
    <style:style style:name="T5" style:family="text">
      <style:text-properties officeooo:rsid="000c8f72"/>
    </style:style>
    <style:style style:name="T6" style:family="text">
      <style:text-properties officeooo:rsid="000da321"/>
    </style:style>
    <style:style style:name="T7" style:family="text">
      <style:text-properties fo:language="en" fo:country="US"/>
    </style:style>
    <style:style style:name="T8" style:family="text">
      <style:text-properties fo:language="sv" fo:country="SE" officeooo:rsid="000e4fb0"/>
    </style:style>
    <style:style style:name="T9" style:family="text">
      <style:text-properties fo:language="sv" fo:country="SE"/>
    </style:style>
    <style:style style:name="T10" style:family="text">
      <style:text-properties fo:language="en" fo:country="GB" officeooo:rsid="000e4fb0"/>
    </style:style>
    <style:style style:name="T11" style:family="text">
      <style:text-properties fo:language="en" fo:country="US" officeooo:rsid="000e4fb0"/>
    </style:style>
    <style:style style:name="T12" style:family="text">
      <style:text-properties fo:language="sv" fo:country="SE" officeooo:rsid="001188dc"/>
    </style:style>
    <style:style style:name="T13" style:family="text">
      <style:text-properties officeooo:rsid="001188dc"/>
    </style:style>
    <style:style style:name="T14" style:family="text">
      <style:text-properties officeooo:rsid="00101bd9"/>
    </style:style>
    <style:style style:name="T15" style:family="text">
      <style:text-properties officeooo:rsid="0014c067"/>
    </style:style>
    <style:style style:name="T16" style:family="text">
      <style:text-properties officeooo:rsid="0013aee5"/>
    </style:style>
    <style:style style:name="T17" style:family="text">
      <style:text-properties fo:language="sv" fo:country="SE" officeooo:rsid="0014c067"/>
    </style:style>
    <style:style style:name="T18" style:family="text">
      <style:text-properties officeooo:rsid="0017e4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gitization project report</text:h>
      <text:p text:style-name="P1">Cecilia Cederström, Johanna Thorelli, Clara Tortosa</text:p>
      <text:h text:style-name="Heading_20_2" text:outline-level="2">Description</text:h>
      <text:p text:style-name="Standard">The project was initialized by talking to a librarian at the Gothenburg University Library about <text:span text:style-name="T1">what kind of printed materials from the 17th century from the library’s special collections that might be relevant for this project. The group had a meeting with Kristina Sevo, a special collections librarian, and discussed this. We looked through </text:span><text:span text:style-name="T2">parts of the </text:span><text:span text:style-name="T1">collection, and </text:span><text:span text:style-name="T2">made</text:span><text:span text:style-name="T1"> the decision to use some examples of occasional poetry, more specifically poetry made to the occasion of a funeral for a woman or girl </text:span><text:span text:style-name="T2">near the end of the 17th century.</text:span></text:p>
      <text:p text:style-name="P2"/>
      <text:p text:style-name="P3">These pieces of poetry are printed in a fraktur type on large sheets, folded in half so that a maximum of four pages is achieved. In the library they were part of a few archival boxes marked up to no more specificity than ”occasional poetry”, but in order to digitize them and make them available they had to be catalogued as individual works. Our project thus became a reason for the library to get this done.</text:p>
      <text:p text:style-name="P3"/>
      <text:p text:style-name="P3">The next step was image capture. The university library has a digitization section, which we were kindly welcomed to. The standard equipment for university digitizations is a Zeut<text:span text:style-name="T3">s</text:span>chel scanner, <text:span text:style-name="T3">which is an open scanner with an adjustable bed.</text:span> <text:span text:style-name="T3">Normally it’s combined with a standard OCR system, but the latter is unable to parse fraktur type, so it was turned off for this project.</text:span></text:p>
      <text:p text:style-name="P3"/>
      <text:p text:style-name="P4">Other than the <text:s/><text:span text:style-name="T2">Zeut</text:span>s<text:span text:style-name="T2">chel </text:span>scanner, we were also allowed to use the Avivision flatbed scanner, and one staff member walked us through image capturing with a Sony camera on a fixed set-up with controlled lightning. <text:span text:style-name="T4">It’s possible the staff was a little too accommodating to us, since we had an expert doing the settings and a little bit of immediate post-processing for these images. <text:s/></text:span><text:span text:style-name="T5">The <text:s/></text:span><text:span text:style-name="T2">Zeut</text:span>s<text:span text:style-name="T2">chel </text:span><text:span text:style-name="T5">scanner and the Sony camera could capture the whole sheet of paper (two sides, so two images per poem), while the Avivision flatbed could only take half a sheet (one page) at a time.</text:span></text:p>
      <text:p text:style-name="P5"/>
      <text:p text:style-name="P6">All in all we <text:span text:style-name="T4">recieved three different TIFF-files for each page of the poems. </text:span><text:span text:style-name="T5">We let the master files keep the university library ID-codes in the file names, but added our o</text:span><text:span text:style-name="T6">w</text:span><text:span text:style-name="T5">n file-naming scheme: 12 letters of the subject’s name, year of publication, page number, plus the name of the apparatus the image was captured with.</text:span></text:p>
      <text:p text:style-name="P6"/>
      <text:p text:style-name="P6"><text:span text:style-name="T5">All of the </text:span><text:span text:style-name="T6">images</text:span><text:span text:style-name="T5"> were of course clear and readable, but after looking them over it was agreed that the standard <text:s/></text:span><text:span text:style-name="T2">Zeut</text:span>s<text:span text:style-name="T2">chel </text:span><text:span text:style-name="T5">scanner was actually the worst version for capturing the look of the originals, and instead we would be using the Sony camera captures as the master files, as they produced better contrast and clearer detail.</text:span></text:p>
      <text:p text:style-name="P4"/>
      <text:p text:style-name="P7">The group discussed what kind of information we wanted to include in the transcription and TEI-coding, and then set to work individually. <text:span text:style-name="T7">Cecilia and Clara both used </text:span><text:span text:style-name="T8">an OCR system called </text:span><text:span text:style-name="T7">Transkribus to generate initial drafts of the transcriptions,</text:span><text:span text:style-name="T9"> </text:span><text:span text:style-name="T8">while</text:span><text:span text:style-name="T9"> </text:span><text:span text:style-name="T7">Johanna preferred to do her</text:span><text:span text:style-name="T8">s directly. Transkribus is freely available online for up to 50 pages (after which it’s a paid service) and is able to parse fraktur, but it does have obvious limitations. </text:span><text:span text:style-name="T10">It struggles to reliable distinguish between </text:span><text:span text:style-name="T11">å and ä, and frequently confuses </text:span><text:span text:style-name="T8">f, </text:span><text:span text:style-name="T11">the long s (ſ) and k. Decorated initials, </text:span><text:span text:style-name="T8">which are always difficult to read,</text:span><text:span text:style-name="T11"> are commonly mis</text:span><text:span text:style-name="T8">interpreted</text:span><text:span text:style-name="T11">. </text:span><text:span text:style-name="T8">Also, w</text:span><text:span text:style-name="T11">ords written</text:span><text:span text:style-name="T8"> close to each other </text:span><text:span text:style-name="T11">tend to merge incorrectly. </text:span><text:span text:style-name="T12">All of the texts have been proofread by all of us.</text:span></text:p>
      <text:p text:style-name="P8"><text:soft-page-break/></text:p>
      <text:p text:style-name="P9"><text:span text:style-name="T13">W</text:span>e made <text:span text:style-name="T13">the</text:span> decision to <text:span text:style-name="T13">transcribe</text:span> each poem exactly as it appears on the page, which includes preserving archaic characters such as ſ (long s), ß (double s) and ʒ (tailed z). We also preserve the original inconsistent spelling, since spelling was not standardized at the time. Obvious spelling mistakes are also allowed to stand, but are marked in TEI with a &lt;sic&gt; tag.</text:p>
      <text:p text:style-name="P9"/>
      <text:p text:style-name="P10">Another decision was to code for people’s and places’ names, and add a &lt;standoff&gt; tag area with explanations to each of these, as a way to provide more value to the reader. </text:p>
      <text:p text:style-name="P8"/>
      <text:p text:style-name="P11">Over several group meetings, we worked to make out TEI-coding consistent between the three of us. <text:span text:style-name="T14">Moving</text:span> on to discuss presentation, <text:span text:style-name="T14">we decided on a split layout, with a facsimile of the page to the left and a transcription to the right. </text:span><text:span text:style-name="T13">The facsimiles on the page are in JPEG-format, one page per image. They have been shrunk to half the pixel size of the TIFF master files, but even so they aren’t shown in full size on the page unless you click on them; otherwise the size depends on the window size. This should be a decent compromize between readability and detail. </text:span><text:span text:style-name="T14">We also decided on a color sceme and some decorations taken from the text, </text:span><text:span text:style-name="T13">and on having the information on people and places pop up on mouseover in the transcription. </text:span></text:p>
      <text:p text:style-name="P11"/>
      <text:p text:style-name="P11"><text:span text:style-name="T14">Working on this, w</text:span>e realized we needed more codes in TEI to accommodate XSL transformation into HTML – <text:span text:style-name="T13">for example </text:span>items such as the &lt;facsimile&gt; element, making sure there was a specific &lt;div&gt; tag for each page, and assuring that the &lt;l&gt;’s of the main poem were all on the same structural level. We had some trouble with one of the poems where the page structure and the poem structure didn’t match, but Johanna figured out a way to make the coding work.</text:p>
      <text:p text:style-name="P12"/>
      <text:p text:style-name="P10">In the end, Johanna made the XSL and CSS for the transformation, and the work is presented as a web page on GitHub.</text:p>
      <text:p text:style-name="P10"/>
      <text:h text:style-name="Heading_20_2" text:outline-level="2">Time expenditure</text:h>
      <text:p text:style-name="P13">Möten:<text:tab/><text:tab/>11 feb (Gruppmöte avstämning)</text:p>
      <text:p text:style-name="P13"><text:tab/><text:tab/><text:tab/>2 mars (Kristina Sevo, tittat på material)</text:p>
      <text:p text:style-name="P13"><text:tab/><text:tab/><text:tab/>10-1<text:span text:style-name="T15">3</text:span> mars (föreläsningar och övningar på HB)</text:p>
      <text:p text:style-name="P13"><text:tab/><text:tab/><text:tab/>17 mars (bildfångst på digitali<text:span text:style-name="T16">seringsavdelningen)</text:span></text:p>
      <text:p text:style-name="P14"><text:tab/><text:tab/><text:tab/><text:span text:style-name="T15">1 april (gruppmöte)</text:span></text:p>
      <text:p text:style-name="P14"><text:span text:style-name="T15"><text:tab/><text:tab/><text:tab/>7 april (gruppmöte)</text:span></text:p>
      <text:p text:style-name="P14"><text:tab/><text:tab/><text:tab/><text:span text:style-name="T15">17 april (gruppmöte)</text:span></text:p>
      <text:p text:style-name="P14"><text:tab/><text:tab/><text:tab/><text:span text:style-name="T15">5 maj (gruppmöte)</text:span></text:p>
      <text:p text:style-name="P15">Eget arbete: <text:tab/>Transkribering</text:p>
      <text:p text:style-name="P15"><text:tab/><text:tab/><text:tab/>Läst på om TEI</text:p>
      <text:p text:style-name="P16"><text:tab/><text:tab/><text:tab/><text:span text:style-name="T17">Arbetat med TEI</text:span></text:p>
      <text:p text:style-name="P17"><text:tab/><text:tab/><text:tab/>Läst på om XSL</text:p>
      <text:p text:style-name="P2"><text:span text:style-name="T15"><text:tab/><text:tab/><text:tab/>Arbetat med XSL, HTML och CSS</text:span></text:p>
      <text:p text:style-name="P18">(för min del vet jag att det är mycket arbete och mycket tid som har gått åt, men det är väldigt svårt att bedöma antal timmar!)</text:p>
      <text:p text:style-name="P19"/>
      <text:h text:style-name="Heading_20_2" text:outline-level="2">The university library</text:h>
      <text:p text:style-name="P20">The Gothenburg University Library has, as mentioned, a division for digitization of material. They mostly work on a ”when needed” basis, meaning that they will digitize when someone asks for <text:soft-page-break/>some particular material. <text:span text:style-name="T18">This is important in making sure older and rarer material stays available. </text:span>However, they <text:span text:style-name="T18">aren’t working </text:span>with critical digitization projects, <text:span text:style-name="T18">but</text:span> <text:span text:style-name="T18">rather </text:span>on a ”good enough” basis. They <text:span text:style-name="T18">have</text:span> staff with expertise in image processing, but usually the output of the <text:span text:style-name="T2">Zeut</text:span><text:span text:style-name="T3">s</text:span><text:span text:style-name="T2">chel </text:span>scanner is deemed enough. <text:span text:style-name="T18">For normal books, their OCR system’s output is enough in that it makes the book digitally searchable, and because the facsimile pages is what the users see, it doesn’t matter if the OCR has errors.</text:span> When we <text:span text:style-name="T18">asked </text:span>about TEI-coding they didn’t recognize the concept at all.</text:p>
      <text:p text:style-name="P21"/>
      <text:p text:style-name="P21">After the course is over we will hand over the result of our work to them, but whether they can use any of it in their digital systems as they look today is unknown.</text:p>
      <text:p text:style-name="P22"/>
      <text:h text:style-name="P23" text:outline-level="2">Cultural heritage</text:h>
      <text:p text:style-name="P24"/>
      <text:h text:style-name="Heading_20_2" text:outline-level="2">Critical analysis</text:h>
      <text:p text:style-name="P2"/>
      <text:h text:style-name="Heading_20_2" text:outline-level="2">Conclusion</text:h>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ce style:name="Palatino" svg:font-family="Palatino"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Palatino" fo:font-size="12pt" fo:language="sv" fo:country="SE" style:letter-kerning="true" style:font-name-asian="Times New Roman" style:font-size-asian="12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801cm" style:writing-mode="page"/>
      <style:text-properties style:use-window-font-color="true" loext:opacity="0%" style:font-name="Palatino" fo:font-size="12pt" fo:language="sv" fo:country="SE" style:letter-kerning="true" style:font-name-asian="Times New Roman" style:font-size-asian="12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0585b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Palatino" fo:font-family="Palatino" style:font-family-generic="roman" style:font-name-asian="Times New Roman" style:font-family-asian="'Times New Roman'" style:font-family-generic-asian="roman"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Palatino" fo:font-family="Palatino" style:font-family-generic="roman" fo:font-size="12pt" fo:font-style="italic" style:font-name-asian="Times New Roman" style:font-family-asian="'Times New Roman'" style:font-family-generic-asian="roman"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alatino" fo:font-family="Palatino" style:font-family-generic="roman" style:font-name-asian="Times New Roman" style:font-family-asian="'Times New Roman'" style:font-family-generic-asian="roman"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8T09:44:36.489904200</meta:creation-date>
    <dc:date>2026-05-18T12:12:30.589662100</dc:date>
    <meta:editing-duration>PT44M5S</meta:editing-duration>
    <meta:editing-cycles>8</meta:editing-cycles>
    <meta:generator>LibreOffice/25.8.6.2$Windows_X86_64 LibreOffice_project/b4b39682cd9868fa725bc664aff94278d315bd04</meta:generator>
    <meta:document-statistic meta:table-count="0" meta:image-count="0" meta:object-count="0" meta:page-count="3" meta:paragraph-count="36" meta:word-count="1165" meta:character-count="6810" meta:non-whitespace-character-count="5639"/>
  </office:meta>
</office:document-meta>
</file>